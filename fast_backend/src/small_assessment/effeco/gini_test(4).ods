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Ménage</text:p>
          </table:table-cell>
          <table:table-cell office:value-type="string" calcext:value-type="string">
            <text:p>sanitation_status</text:p>
          </table:table-cell>
          <table:table-cell office:value-type="string" calcext:value-type="string">
            <text:p>car_exc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.95" calcext:value-type="float">
            <text:p>26,9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8.07" calcext:value-type="float">
            <text:p>48,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.87" calcext:value-type="float">
            <text:p>33,8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.16" calcext:value-type="float">
            <text:p>28,1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,4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75" calcext:value-type="float">
            <text:p>19,7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.97" calcext:value-type="float">
            <text:p>16,9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.91" calcext:value-type="float">
            <text:p>22,9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8.71" calcext:value-type="float">
            <text:p>38,7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.42" calcext:value-type="float">
            <text:p>49,4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.82" calcext:value-type="float">
            <text:p>14,8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,0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.69" calcext:value-type="float">
            <text:p>25,6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7.49" calcext:value-type="float">
            <text:p>37,4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6.65" calcext:value-type="float">
            <text:p>16,6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,7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,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1.25" calcext:value-type="float">
            <text:p>21,2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3.83" calcext:value-type="float">
            <text:p>13,8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3.88" calcext:value-type="float">
            <text:p>23,88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.71" calcext:value-type="float">
            <text:p>16,7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,66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7.18" calcext:value-type="float">
            <text:p>7,18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5.48" calcext:value-type="float">
            <text:p>15,4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3.65" calcext:value-type="float">
            <text:p>13,6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2.06" calcext:value-type="float">
            <text:p>12,06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,81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0.22" calcext:value-type="float">
            <text:p>40,22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1.97" calcext:value-type="float">
            <text:p>21,97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5.39" calcext:value-type="float">
            <text:p>5,39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4.58" calcext:value-type="float">
            <text:p>14,58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.7" calcext:value-type="float">
            <text:p>61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.62" calcext:value-type="float">
            <text:p>12,6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9.74" calcext:value-type="float">
            <text:p>39,7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7.53" calcext:value-type="float">
            <text:p>27,5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0.56" calcext:value-type="float">
            <text:p>110,5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7.91" calcext:value-type="float">
            <text:p>127,9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8.22" calcext:value-type="float">
            <text:p>18,2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.84" calcext:value-type="float">
            <text:p>25,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2.85" calcext:value-type="float">
            <text:p>52,8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4.67" calcext:value-type="float">
            <text:p>74,6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4.17" calcext:value-type="float">
            <text:p>64,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.43" calcext:value-type="float">
            <text:p>66,4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.24" calcext:value-type="float">
            <text:p>9,2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.83" calcext:value-type="float">
            <text:p>9,8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8.62" calcext:value-type="float">
            <text:p>48,6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6.54" calcext:value-type="float">
            <text:p>56,5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1.72" calcext:value-type="float">
            <text:p>51,7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.83" calcext:value-type="float">
            <text:p>70,8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2.86" calcext:value-type="float">
            <text:p>12,8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,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93.95" calcext:value-type="float">
            <text:p>93,9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4.54" calcext:value-type="float">
            <text:p>64,5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7.97" calcext:value-type="float">
            <text:p>37,9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4.49" calcext:value-type="float">
            <text:p>44,4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7.81" calcext:value-type="float">
            <text:p>57,8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62.62" calcext:value-type="float">
            <text:p>62,6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,2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,6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5.87" calcext:value-type="float">
            <text:p>35,8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.31" calcext:value-type="float">
            <text:p>6,3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8.99" calcext:value-type="float">
            <text:p>48,9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1.46" calcext:value-type="float">
            <text:p>31,4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7.16" calcext:value-type="float">
            <text:p>27,1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,8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4.55" calcext:value-type="float">
            <text:p>24,5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40.17" calcext:value-type="float">
            <text:p>40,1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64.17" calcext:value-type="float">
            <text:p>64,1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3.38" calcext:value-type="float">
            <text:p>33,3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34,1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41.05" calcext:value-type="float">
            <text:p>41,0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59.04" calcext:value-type="float">
            <text:p>59,0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80.28" calcext:value-type="float">
            <text:p>80,2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,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,59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4.48" calcext:value-type="float">
            <text:p>34,48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38.88" calcext:value-type="float">
            <text:p>38,8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1.34" calcext:value-type="float">
            <text:p>11,34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9.93" calcext:value-type="float">
            <text:p>9,93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2.44" calcext:value-type="float">
            <text:p>32,44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71.07" calcext:value-type="float">
            <text:p>71,07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56.98" calcext:value-type="float">
            <text:p>56,98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90.79" calcext:value-type="float">
            <text:p>90,79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65.81" calcext:value-type="float">
            <text:p>65,81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7.78" calcext:value-type="float">
            <text:p>47,78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47.29" calcext:value-type="float">
            <text:p>47,29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55.67" calcext:value-type="float">
            <text:p>55,67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6.19" calcext:value-type="float">
            <text:p>16,19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45.79" calcext:value-type="float">
            <text:p>45,7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6.55" calcext:value-type="float">
            <text:p>16,55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,59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71.53" calcext:value-type="float">
            <text:p>71,5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7.71" calcext:value-type="float">
            <text:p>7,7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36.67" calcext:value-type="float">
            <text:p>36,6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5.01" calcext:value-type="float">
            <text:p>35,01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1.08" calcext:value-type="float">
            <text:p>51,08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24.99" calcext:value-type="float">
            <text:p>24,99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7.35" calcext:value-type="float">
            <text:p>7,35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43.85" calcext:value-type="float">
            <text:p>43,8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1.58" calcext:value-type="float">
            <text:p>31,58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73.78" calcext:value-type="float">
            <text:p>73,78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42.24" calcext:value-type="float">
            <text:p>42,24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25.95" calcext:value-type="float">
            <text:p>25,95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9.21" calcext:value-type="float">
            <text:p>19,2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6.77" calcext:value-type="float">
            <text:p>46,77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9.08" calcext:value-type="float">
            <text:p>9,08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0.18" calcext:value-type="float">
            <text:p>10,18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2.59" calcext:value-type="float">
            <text:p>12,59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,9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44.07" calcext:value-type="float">
            <text:p>44,07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46.54" calcext:value-type="float">
            <text:p>46,54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50.42" calcext:value-type="float">
            <text:p>50,42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4.78" calcext:value-type="float">
            <text:p>24,78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5.15" calcext:value-type="float">
            <text:p>25,15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21.37" calcext:value-type="float">
            <text:p>21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5:26:33.235690962</meta:creation-date>
    <dc:date>2025-01-30T15:27:57.468770817</dc:date>
    <meta:editing-duration>PT1M27S</meta:editing-duration>
    <meta:editing-cycles>1</meta:editing-cycles>
    <meta:document-statistic meta:table-count="1" meta:cell-count="1377" meta:object-count="0"/>
    <meta:generator>LibreOffice/24.8.3.2$Linux_X86_64 LibreOffice_project/e14c9fdd1f585efcbb2c5363087a99d20928d522</meta:generator>
  </office:meta>
</office:document-meta>
</file>